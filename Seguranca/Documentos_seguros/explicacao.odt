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Cantarell Extra Bold" officeooo:rsid="00160db3" officeooo:paragraph-rsid="00160db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160d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aixo, vou explicar o script linha por linha (ou em grupos lógicos para evitar repetição), de forma estruturada. O script é um monitor de integridade de arquivos em Python, que gera baselines, detecta mudanças, duplicatas, cria backups, registra logs e gera relatórios. Ele usa bibliotecas padrão do Python para manipulação de arquivos, hashes, logs e datas.</text:p>
      <text:p text:style-name="Text_20_body">Vou dividir a explicação por seções (funções e blocos principais), com <text:span text:style-name="Strong_20_Emphasis">sub-headers em negrito</text:span> para organização. Para cada linha ou grupo, explico o que faz, seu propósito e contexto. Assumindo que você está familiarizado com conceitos básicos de Python, focarei em detalhes específicos.</text:p>
      <text:h text:style-name="Heading_20_3" text:outline-level="3"><text:span text:style-name="Strong_20_Emphasis">Imports Iniciais</text:span></text:h>
      <text:p text:style-name="Text_20_body">Essas linhas importam bibliotecas necessárias para o funcionamento do script.</text:p>
      <text:list text:style-name="L1">
        <text:list-item>
          <text:p text:style-name="P3"><text:span text:style-name="Source_20_Text">import os</text:span>: Fornece funções para interagir com o sistema operacional, como navegar diretórios e verificar arquivos. </text:p>
        </text:list-item>
        <text:list-item>
          <text:p text:style-name="P3"><text:span text:style-name="Source_20_Text">import hashlib</text:span>: Usado para calcular hashes SHA-256 de arquivos. </text:p>
        </text:list-item>
        <text:list-item>
          <text:p text:style-name="P3"><text:span text:style-name="Source_20_Text">import json</text:span>: Permite ler e escrever dados em formato JSON (para o baseline e relatórios). </text:p>
        </text:list-item>
        <text:list-item>
          <text:p text:style-name="P3"><text:span text:style-name="Source_20_Text">import logging</text:span>: Gerencia logs estruturados com níveis (INFO, WARNING, ERROR) e timestamps. </text:p>
        </text:list-item>
        <text:list-item>
          <text:p text:style-name="P3"><text:span text:style-name="Source_20_Text">import shutil</text:span>: Utilizado para copiar arquivos (para backups). </text:p>
        </text:list-item>
        <text:list-item>
          <text:p text:style-name="P3"><text:span text:style-name="Source_20_Text">import getpass</text:span>: Obtém o nome do usuário do sistema (para incluir nos logs). </text:p>
        </text:list-item>
        <text:list-item>
          <text:p text:style-name="P3"><text:span text:style-name="Source_20_Text">from datetime import datetime</text:span>: Importa a classe <text:span text:style-name="Source_20_Text">datetime</text:span> para trabalhar com datas e horas (timestamps nos logs e backups). </text:p>
        </text:list-item>
        <text:list-item>
          <text:p text:style-name="P2"><text:span text:style-name="Source_20_Text">from collections import defaultdict</text:span>: Fornece um dicionário que inicializa valores automaticamente (usado para contar eventos). </text:p>
        </text:list-item>
      </text:list>
      <text:h text:style-name="Heading_20_3" text:outline-level="3"><text:span text:style-name="Strong_20_Emphasis">Função </text:span><text:span text:style-name="Strong_20_Emphasis"><text:span text:style-name="Source_20_Text">calculate_sha256(file_path)</text:span></text:span></text:h>
      <text:p text:style-name="Text_20_body">Calcula o hash SHA-256 de um arquivo, lendo-o em blocos para eficiência.</text:p>
      <text:list text:style-name="L2">
        <text:list-item>
          <text:p text:style-name="P5"><text:span text:style-name="Source_20_Text">def calculate_sha256(file_path):</text:span>: Define a função que recebe o caminho do arquivo. </text:p>
        </text:list-item>
        <text:list-item>
          <text:p text:style-name="P5"><text:span text:style-name="Source_20_Text">"""Docstring""":</text:span>: Comentário explicativo da função (não executa código). </text:p>
        </text:list-item>
        <text:list-item>
          <text:p text:style-name="P5"><text:span text:style-name="Source_20_Text">sha256_hash = hashlib.sha256()</text:span>: Cria um objeto hash SHA-256 vazio. </text:p>
        </text:list-item>
        <text:list-item>
          <text:p text:style-name="P5"><text:span text:style-name="Source_20_Text">try:</text:span>: Inicia bloco de tratamento de erros. </text:p>
        </text:list-item>
        <text:list-item>
          <text:p text:style-name="P5"><text:span text:style-name="Source_20_Text">with open(file_path, "rb") as f:</text:span>: Abre o arquivo em modo binário ("rb") para leitura segura. </text:p>
        </text:list-item>
        <text:list-item>
          <text:p text:style-name="P5"><text:span text:style-name="Source_20_Text">for block in iter(lambda: f.read(4096), b""):</text:span>: Lê o arquivo em blocos de 4096 bytes (para arquivos grandes, evita carregar tudo na memória). </text:p>
        </text:list-item>
        <text:list-item>
          <text:p text:style-name="P5"><text:span text:style-name="Source_20_Text">sha256_hash.update(block)</text:span>: Atualiza o hash com cada bloco lido. </text:p>
        </text:list-item>
        <text:list-item>
          <text:p text:style-name="P5"><text:span text:style-name="Source_20_Text">return sha256_hash.hexdigest()</text:span>: Retorna o hash final como string hexadecimal. </text:p>
        </text:list-item>
        <text:list-item>
          <text:p text:style-name="P5"><text:span text:style-name="Source_20_Text">except Exception as e:</text:span>: Captura erros (ex.: arquivo inacessível). </text:p>
        </text:list-item>
        <text:list-item>
          <text:p text:style-name="P5"><text:span text:style-name="Source_20_Text">print(f"Erro ao calcular hash para {file_path}: {e}")</text:span>: Imprime mensagem de erro. </text:p>
        </text:list-item>
        <text:list-item>
          <text:p text:style-name="P4"><text:span text:style-name="Source_20_Text">return None</text:span>: Retorna None se houver erro, para evitar falhas no resto do script. </text:p>
        </text:list-item>
      </text:list>
      <text:h text:style-name="Heading_20_3" text:outline-level="3"><text:soft-page-break/><text:span text:style-name="Strong_20_Emphasis">Função </text:span><text:span text:style-name="Strong_20_Emphasis"><text:span text:style-name="Source_20_Text">generate_baseline(directory)</text:span></text:span></text:h>
      <text:p text:style-name="Text_20_body">Percorre o diretório e gera o arquivo <text:span text:style-name="Source_20_Text">hashes.json</text:span> com hashes de todos os arquivos.</text:p>
      <text:list text:style-name="L3">
        <text:list-item>
          <text:p text:style-name="P7"><text:span text:style-name="Source_20_Text">def generate_baseline(directory):</text:span>: Define a função que recebe o diretório a escanear. </text:p>
        </text:list-item>
        <text:list-item>
          <text:p text:style-name="P7"><text:span text:style-name="Source_20_Text">"""Docstring""":</text:span>: Comentário explicativo. </text:p>
        </text:list-item>
        <text:list-item>
          <text:p text:style-name="P7"><text:span text:style-name="Source_20_Text">hashes = {}</text:span>: Inicializa um dicionário vazio para armazenar caminhos relativos e hashes. </text:p>
        </text:list-item>
        <text:list-item>
          <text:p text:style-name="P7"><text:span text:style-name="Source_20_Text">for root, dirs, files in os.walk(directory):</text:span>: Percorre recursivamente o diretório (inclui subpastas). </text:p>
        </text:list-item>
        <text:list-item>
          <text:p text:style-name="P7"><text:span text:style-name="Source_20_Text">for file in files:</text:span>: Itera sobre cada arquivo na pasta atual. </text:p>
        </text:list-item>
        <text:list-item>
          <text:p text:style-name="P7"><text:span text:style-name="Source_20_Text">full_path = os.path.join(root, file)</text:span>: Constrói o caminho completo do arquivo. </text:p>
        </text:list-item>
        <text:list-item>
          <text:p text:style-name="P7"><text:span text:style-name="Source_20_Text">relative_path = os.path.relpath(full_path, directory)</text:span>: Calcula o caminho relativo ao diretório raiz (para portabilidade). </text:p>
        </text:list-item>
        <text:list-item>
          <text:p text:style-name="P7"><text:span text:style-name="Source_20_Text">hash_value = calculate_sha256(full_path)</text:span>: Chama a função para calcular o hash. </text:p>
        </text:list-item>
        <text:list-item>
          <text:p text:style-name="P7"><text:span text:style-name="Source_20_Text">if hash_value:</text:span>: Verifica se o hash foi calculado com sucesso (não None). </text:p>
        </text:list-item>
        <text:list-item>
          <text:p text:style-name="P7"><text:span text:style-name="Source_20_Text">hashes[relative_path] = hash_value</text:span>: Adiciona o par caminho-hash ao dicionário. </text:p>
        </text:list-item>
        <text:list-item>
          <text:p text:style-name="P7"><text:span text:style-name="Source_20_Text">with open('hashes.json', 'w') as json_file:</text:span>: Abre/cria o arquivo <text:span text:style-name="Source_20_Text">hashes.json</text:span> para escrita. </text:p>
        </text:list-item>
        <text:list-item>
          <text:p text:style-name="P7"><text:span text:style-name="Source_20_Text">json.dump(hashes, json_file, indent=4)</text:span>: Escreve o dicionário no arquivo JSON com indentação para legibilidade. </text:p>
        </text:list-item>
        <text:list-item>
          <text:p text:style-name="P7"><text:span text:style-name="Source_20_Text">print(f"Baseline gerado com sucesso em hashes.json no diretório atual.")</text:span>: Imprime confirmação. </text:p>
        </text:list-item>
        <text:list-item>
          <text:p text:style-name="P6"><text:span text:style-name="Source_20_Text">create_backup('hashes.json')</text:span>: Chama a função para criar um backup do baseline. </text:p>
        </text:list-item>
      </text:list>
      <text:h text:style-name="Heading_20_3" text:outline-level="3"><text:span text:style-name="Strong_20_Emphasis">Função </text:span><text:span text:style-name="Strong_20_Emphasis"><text:span text:style-name="Source_20_Text">create_backup(source_file)</text:span></text:span></text:h>
      <text:p text:style-name="Text_20_body">Cria uma cópia de backup do <text:span text:style-name="Source_20_Text">hashes.json</text:span> em uma pasta <text:span text:style-name="Source_20_Text">backups/</text:span> com data.</text:p>
      <text:list text:style-name="L4">
        <text:list-item>
          <text:p text:style-name="P9"><text:span text:style-name="Source_20_Text">def create_backup(source_file):</text:span>: Define a função que recebe o arquivo a copiar. </text:p>
        </text:list-item>
        <text:list-item>
          <text:p text:style-name="P9"><text:span text:style-name="Source_20_Text">"""Docstring""":</text:span>: Comentário explicativo. </text:p>
        </text:list-item>
        <text:list-item>
          <text:p text:style-name="P9"><text:span text:style-name="Source_20_Text">if os.path.exists(source_file):</text:span>: Verifica se o arquivo fonte existe. </text:p>
        </text:list-item>
        <text:list-item>
          <text:p text:style-name="P9"><text:span text:style-name="Source_20_Text">backup_dir = 'backups'</text:span>: Define o nome da pasta de backups. </text:p>
        </text:list-item>
        <text:list-item>
          <text:p text:style-name="P9"><text:span text:style-name="Source_20_Text">os.makedirs(backup_dir, exist_ok=True)</text:span>: Cria a pasta se não existir (sem erro se já existir). </text:p>
        </text:list-item>
        <text:list-item>
          <text:p text:style-name="P9"><text:span text:style-name="Source_20_Text">timestamp = datetime.now().strftime('%Y%m%d')</text:span>: Gera um timestamp no formato YYYYMMDD (ex.: 20231001). </text:p>
        </text:list-item>
        <text:list-item>
          <text:p text:style-name="P9"><text:span text:style-name="Source_20_Text">backup_file = os.path.join(backup_dir, f'hashes_{timestamp}.json')</text:span>: Constrói o nome do arquivo de backup. </text:p>
        </text:list-item>
        <text:list-item>
          <text:p text:style-name="P9"><text:soft-page-break/><text:span text:style-name="Source_20_Text">shutil.copy(source_file, backup_file)</text:span>: Copia o arquivo fonte para o backup. </text:p>
        </text:list-item>
        <text:list-item>
          <text:p text:style-name="P8"><text:span text:style-name="Source_20_Text">print(f"Backup criado: {backup_file}")</text:span>: Imprime confirmação do backup. </text:p>
        </text:list-item>
      </text:list>
      <text:h text:style-name="Heading_20_3" text:outline-level="3"><text:span text:style-name="Strong_20_Emphasis">Função </text:span><text:span text:style-name="Strong_20_Emphasis"><text:span text:style-name="Source_20_Text">load_baseline(baseline_file='hashes.json')</text:span></text:span></text:h>
      <text:p text:style-name="Text_20_body">Carrega o baseline do arquivo JSON.</text:p>
      <text:list text:style-name="L5">
        <text:list-item>
          <text:p text:style-name="P11"><text:span text:style-name="Source_20_Text">def load_baseline(baseline_file='hashes.json'):</text:span>: Define a função com parâmetro padrão. </text:p>
        </text:list-item>
        <text:list-item>
          <text:p text:style-name="P11"><text:span text:style-name="Source_20_Text">"""Docstring""":</text:span>: Comentário explicativo. </text:p>
        </text:list-item>
        <text:list-item>
          <text:p text:style-name="P11"><text:span text:style-name="Source_20_Text">if os.path.exists(baseline_file):</text:span>: Verifica se o arquivo existe. </text:p>
        </text:list-item>
        <text:list-item>
          <text:p text:style-name="P11"><text:span text:style-name="Source_20_Text">with open(baseline_file, 'r') as f:</text:span>: Abre o arquivo para leitura. </text:p>
        </text:list-item>
        <text:list-item>
          <text:p text:style-name="P11"><text:span text:style-name="Source_20_Text">return json.load(f)</text:span>: Carrega e retorna o dicionário JSON. </text:p>
        </text:list-item>
        <text:list-item>
          <text:p text:style-name="P11"><text:span text:style-name="Source_20_Text">else:</text:span>: Se o arquivo não existir. </text:p>
        </text:list-item>
        <text:list-item>
          <text:p text:style-name="P10"><text:span text:style-name="Source_20_Text">return {}</text:span>: Retorna um dicionário vazio. </text:p>
        </text:list-item>
      </text:list>
      <text:h text:style-name="Heading_20_3" text:outline-level="3"><text:span text:style-name="Strong_20_Emphasis">Função </text:span><text:span text:style-name="Strong_20_Emphasis"><text:span text:style-name="Source_20_Text">detect_duplicates(new_hashes)</text:span></text:span></text:h>
      <text:p text:style-name="Text_20_body">Detecta arquivos com o mesmo hash e registra no log.</text:p>
      <text:list text:style-name="L6">
        <text:list-item>
          <text:p text:style-name="P13"><text:span text:style-name="Source_20_Text">def detect_duplicates(new_hashes):</text:span>: Define a função que recebe o dicionário de hashes atuais. </text:p>
        </text:list-item>
        <text:list-item>
          <text:p text:style-name="P13"><text:span text:style-name="Source_20_Text">"""Docstring""":</text:span>: Comentário explicativo. </text:p>
        </text:list-item>
        <text:list-item>
          <text:p text:style-name="P13"><text:span text:style-name="Source_20_Text">hash_to_files = {}</text:span>: Inicializa dicionário para agrupar arquivos por hash. </text:p>
        </text:list-item>
        <text:list-item>
          <text:p text:style-name="P13"><text:span text:style-name="Source_20_Text">for file_path, hash_value in new_hashes.items():</text:span>: Itera sobre os hashes atuais. </text:p>
        </text:list-item>
        <text:list-item>
          <text:p text:style-name="P13"><text:span text:style-name="Source_20_Text">if hash_value not in hash_to_files:</text:span>: Se o hash não estiver no dicionário. </text:p>
        </text:list-item>
        <text:list-item>
          <text:p text:style-name="P13"><text:span text:style-name="Source_20_Text">hash_to_files[hash_value] = []</text:span>: Inicializa lista vazia para esse hash. </text:p>
        </text:list-item>
        <text:list-item>
          <text:p text:style-name="P13"><text:span text:style-name="Source_20_Text">hash_to_files[hash_value].append(file_path)</text:span>: Adiciona o arquivo à lista do hash. </text:p>
        </text:list-item>
        <text:list-item>
          <text:p text:style-name="P13"><text:span text:style-name="Source_20_Text">for hash_value, files in hash_to_files.items():</text:span>: Itera sobre os hashes agrupados. </text:p>
        </text:list-item>
        <text:list-item>
          <text:p text:style-name="P13"><text:span text:style-name="Source_20_Text">if len(files) &gt; 1:</text:span>: Se houver mais de um arquivo com o mesmo hash. </text:p>
        </text:list-item>
        <text:list-item>
          <text:p text:style-name="P13"><text:span text:style-name="Source_20_Text">files_sorted = sorted(files)</text:span>: Ordena os arquivos alfabeticamente para consistência. </text:p>
        </text:list-item>
        <text:list-item>
          <text:p text:style-name="P13"><text:span text:style-name="Source_20_Text">for i in range(len(files_sorted) - 1):</text:span>: Loop para combinar pares de arquivos. </text:p>
        </text:list-item>
        <text:list-item>
          <text:p text:style-name="P13"><text:span text:style-name="Source_20_Text">for j in range(i + 1, len(files_sorted)):</text:span>: Gera combinações únicas. </text:p>
        </text:list-item>
        <text:list-item>
          <text:p text:style-name="P12"><text:span text:style-name="Source_20_Text">logging.info(f"POSSÍVEL DUPLICATA: {files_sorted[i]} e {files_sorted[j]}", extra={'user': getpass.getuser()})</text:span>: Registra no log com nível INFO e usuário. </text:p>
        </text:list-item>
      </text:list>
      <text:h text:style-name="Heading_20_3" text:outline-level="3"><text:soft-page-break/><text:span text:style-name="Strong_20_Emphasis">Função </text:span><text:span text:style-name="Strong_20_Emphasis"><text:span text:style-name="Source_20_Text">generate_report(log_file='logs_monitor.log', report_file='relatorio.md')</text:span></text:span></text:h>
      <text:p text:style-name="Text_20_body">Gera o relatório baseado no log.</text:p>
      <text:list text:style-name="L7">
        <text:list-item>
          <text:p text:style-name="P15"><text:span text:style-name="Source_20_Text">def generate_report(log_file='logs_monitor.log', report_file='relatorio.md'):</text:span>: Define a função com parâmetros padrão. </text:p>
        </text:list-item>
        <text:list-item>
          <text:p text:style-name="P15"><text:span text:style-name="Source_20_Text">"""Docstring""":</text:span>: Comentário explicativo. </text:p>
        </text:list-item>
        <text:list-item>
          <text:p text:style-name="P15"><text:span text:style-name="Source_20_Text">if not os.path.exists(log_file):</text:span>: Verifica se o log existe. </text:p>
        </text:list-item>
        <text:list-item>
          <text:p text:style-name="P15"><text:span text:style-name="Source_20_Text">print(f"Erro: Arquivo de log '{log_file}' não encontrado. Não é possível gerar relatório.")</text:span>: Imprime erro. </text:p>
        </text:list-item>
        <text:list-item>
          <text:p text:style-name="P15"><text:span text:style-name="Source_20_Text">return</text:span>: Sai da função. </text:p>
        </text:list-item>
        <text:list-item>
          <text:p text:style-name="P15"><text:span text:style-name="Source_20_Text">event_counts = defaultdict(int)</text:span>: Inicializa contador de eventos (criações, etc.). </text:p>
        </text:list-item>
        <text:list-item>
          <text:p text:style-name="P15"><text:span text:style-name="Source_20_Text">file_changes = defaultdict(int)</text:span>: Inicializa contador de alterações por arquivo. </text:p>
        </text:list-item>
        <text:list-item>
          <text:p text:style-name="P15"><text:span text:style-name="Source_20_Text">with open(log_file, 'r') as f:</text:span>: Abre o log para leitura. </text:p>
        </text:list-item>
        <text:list-item>
          <text:p text:style-name="P15"><text:span text:style-name="Source_20_Text">for line in f:</text:span>: Itera sobre cada linha do log. </text:p>
        </text:list-item>
        <text:list-item>
          <text:p text:style-name="P15"><text:span text:style-name="Source_20_Text">if ' - ' in line:</text:span>: Verifica se a linha tem o formato esperado. </text:p>
        </text:list-item>
        <text:list-item>
          <text:p text:style-name="P15"><text:span text:style-name="Source_20_Text">parts = line.split(' - ', 3)</text:span>: Divide a linha em partes (data, user, level, message). </text:p>
        </text:list-item>
        <text:list-item>
          <text:p text:style-name="P15"><text:span text:style-name="Source_20_Text">if len(parts) &gt;= 4:</text:span>: Verifica se há pelo menos 4 partes. </text:p>
        </text:list-item>
        <text:list-item>
          <text:p text:style-name="P15"><text:span text:style-name="Source_20_Text">event = parts[3].strip()</text:span>: Extrai a mensagem do evento. </text:p>
        </text:list-item>
        <text:list-item>
          <text:p text:style-name="P15"><text:span text:style-name="Source_20_Text">if event.startswith('Criação:'):</text:span>: Se for criação, incrementa contador e alterações por arquivo. </text:p>
        </text:list-item>
        <text:list-item>
          <text:p text:style-name="P15"><text:span text:style-name="Source_20_Text">event_counts['Criações'] += 1</text:span>: Incrementa total de criações. </text:p>
        </text:list-item>
        <text:list-item>
          <text:p text:style-name="P15"><text:span text:style-name="Source_20_Text">file_changes[event.split(': ')[1]] += 1</text:span>: Incrementa alterações para o arquivo específico. </text:p>
        </text:list-item>
        <text:list-item>
          <text:p text:style-name="P15">(Linhas similares para 'Alteração:', 'Exclusão:' e 'POSSÍVEL DUPLICATA:'). </text:p>
        </text:list-item>
        <text:list-item>
          <text:p text:style-name="P15"><text:span text:style-name="Source_20_Text">top_files = sorted(file_changes.items(), key=lambda x: x[1], reverse=True)[:5]</text:span>: Ordena arquivos por alterações (top 5). </text:p>
        </text:list-item>
        <text:list-item>
          <text:p text:style-name="P15"><text:span text:style-name="Source_20_Text">with open(report_file, 'w') as f:</text:span>: Abre o relatório para escrita. </text:p>
        </text:list-item>
        <text:list-item>
          <text:p text:style-name="P15">(Linhas seguintes escrevem o conteúdo do relatório em Markdown, incluindo resumo, totais e recomendações). </text:p>
        </text:list-item>
        <text:list-item>
          <text:p text:style-name="P14"><text:span text:style-name="Source_20_Text">print(f"Relatório gerado com sucesso em {report_file}.")</text:span>: Imprime confirmação. </text:p>
        </text:list-item>
      </text:list>
      <text:h text:style-name="Heading_20_3" text:outline-level="3"><text:span text:style-name="Strong_20_Emphasis">Função </text:span><text:span text:style-name="Strong_20_Emphasis"><text:span text:style-name="Source_20_Text">detect_changes(directory, baseline_file='hashes.json')</text:span></text:span></text:h>
      <text:p text:style-name="Text_20_body">Detecta mudanças comparando com o baseline e registra logs.</text:p>
      <text:list text:style-name="L8">
        <text:list-item>
          <text:p text:style-name="P17"><text:span text:style-name="Source_20_Text">def detect_changes(directory, baseline_file='hashes.json'):</text:span>: Define a função. </text:p>
        </text:list-item>
        <text:list-item>
          <text:p text:style-name="P17"><text:span text:style-name="Source_20_Text">"""Docstring""":</text:span>: Comentário explicativo. </text:p>
        </text:list-item>
        <text:list-item>
          <text:p text:style-name="P17"><text:soft-page-break/><text:span text:style-name="Source_20_Text">class CustomFormatter(logging.Formatter):</text:span>: Define uma classe para customizar o formato dos logs. </text:p>
        </text:list-item>
        <text:list-item>
          <text:p text:style-name="P17"><text:span text:style-name="Source_20_Text">def format(self, record):</text:span>: Método para formatar cada log. </text:p>
        </text:list-item>
        <text:list-item>
          <text:p text:style-name="P17"><text:span text:style-name="Source_20_Text">record.user = getattr(record, 'user', 'unknown')</text:span>: Adiciona o usuário ao registro. </text:p>
        </text:list-item>
        <text:list-item>
          <text:p text:style-name="P17"><text:span text:style-name="Source_20_Text">return super().format(record)</text:span>: Retorna o log formatado. </text:p>
        </text:list-item>
        <text:list-item>
          <text:p text:style-name="P17"><text:span text:style-name="Source_20_Text">formatter = CustomFormatter('%(asctime)s - user=%(user)s - %(levelname)s - %(message)s', datefmt='%Y-%m-%d %H:%M:%S')</text:span>: Define o formato do log. </text:p>
        </text:list-item>
        <text:list-item>
          <text:p text:style-name="P17"><text:span text:style-name="Source_20_Text">handler = logging.FileHandler('logs_monitor.log')</text:span>: Cria handler para escrever no arquivo de log. </text:p>
        </text:list-item>
        <text:list-item>
          <text:p text:style-name="P17"><text:span text:style-name="Source_20_Text">handler.setFormatter(formatter)</text:span>: Aplica o formatter. </text:p>
        </text:list-item>
        <text:list-item>
          <text:p text:style-name="P17"><text:span text:style-name="Source_20_Text">logger = logging.getLogger()</text:span>: Obtém o logger global. </text:p>
        </text:list-item>
        <text:list-item>
          <text:p text:style-name="P17"><text:span text:style-name="Source_20_Text">logger.setLevel(logging.INFO)</text:span>: Define nível mínimo de log. </text:p>
        </text:list-item>
        <text:list-item>
          <text:p text:style-name="P17"><text:span text:style-name="Source_20_Text">logger.addHandler(handler)</text:span>: Adiciona o handler. </text:p>
        </text:list-item>
        <text:list-item>
          <text:p text:style-name="P17"><text:span text:style-name="Source_20_Text">baseline = load_baseline(baseline_file)</text:span>: Carrega o baseline. </text:p>
        </text:list-item>
        <text:list-item>
          <text:p text:style-name="P17"><text:span text:style-name="Source_20_Text">if not baseline:</text:span>: Se não houver baseline. </text:p>
        </text:list-item>
        <text:list-item>
          <text:p text:style-name="P17"><text:span text:style-name="Source_20_Text">print("Baseline não encontrado. Gerando novo baseline...")</text:span>: Imprime mensagem. </text:p>
        </text:list-item>
        <text:list-item>
          <text:p text:style-name="P17"><text:span text:style-name="Source_20_Text">generate_baseline(directory)</text:span>: Gera o baseline. </text:p>
        </text:list-item>
        <text:list-item>
          <text:p text:style-name="P17"><text:span text:style-name="Source_20_Text">return</text:span>: Sai da função. </text:p>
        </text:list-item>
        <text:list-item>
          <text:p text:style-name="P17"><text:span text:style-name="Source_20_Text">new_hashes = {}</text:span>: Inicializa dicionário para novos hashes. </text:p>
        </text:list-item>
        <text:list-item>
          <text:p text:style-name="P17">(Loop similar ao <text:span text:style-name="Source_20_Text">generate_baseline</text:span> para escanear e calcular hashes). </text:p>
        </text:list-item>
        <text:list-item>
          <text:p text:style-name="P17"><text:span text:style-name="Source_20_Text">changes_detected = False</text:span>: Flag para indicar se houve mudanças. </text:p>
        </text:list-item>
        <text:list-item>
          <text:p text:style-name="P17"><text:span text:style-name="Source_20_Text">for file_path, new_hash in new_hashes.items():</text:span>: Itera sobre novos hashes. </text:p>
        </text:list-item>
        <text:list-item>
          <text:p text:style-name="P17"><text:span text:style-name="Source_20_Text">if file_path not in baseline:</text:span>: Se arquivo é novo. </text:p>
        </text:list-item>
        <text:list-item>
          <text:p text:style-name="P17"><text:span text:style-name="Source_20_Text">logging.info(f"Criação: {file_path}", extra={'user': getpass.getuser()})</text:span>: Registra criação com INFO. </text:p>
        </text:list-item>
        <text:list-item>
          <text:p text:style-name="P17"><text:span text:style-name="Source_20_Text">changes_detected = True</text:span>: Marca que houve mudança. </text:p>
        </text:list-item>
        <text:list-item>
          <text:p text:style-name="P17"><text:span text:style-name="Source_20_Text">elif baseline[file_path] != new_hash:</text:span>: Se hash mudou. </text:p>
        </text:list-item>
        <text:list-item>
          <text:p text:style-name="P17"><text:span text:style-name="Source_20_Text">logging.warning(f"Alteração: {file_path}", extra={'user': getpass.getuser()})</text:span>: Registra alteração com WARNING. </text:p>
        </text:list-item>
        <text:list-item>
          <text:p text:style-name="P17"><text:span text:style-name="Source_20_Text">changes_detected = True</text:span>: Marca mudança. </text:p>
        </text:list-item>
        <text:list-item>
          <text:p text:style-name="P17"><text:span text:style-name="Source_20_Text">for file_path in baseline:</text:span>: Itera sobre baseline. </text:p>
        </text:list-item>
        <text:list-item>
          <text:p text:style-name="P17"><text:span text:style-name="Source_20_Text">if file_path not in new_hashes:</text:span>: Se arquivo foi excluído. </text:p>
        </text:list-item>
        <text:list-item>
          <text:p text:style-name="P17"><text:span text:style-name="Source_20_Text">logging.error(f"Exclusão: {file_path}", extra={'user': getpass.getuser()})</text:span>: Registra exclusão com ERROR. </text:p>
        </text:list-item>
        <text:list-item>
          <text:p text:style-name="P17"><text:span text:style-name="Source_20_Text">changes_detected = True</text:span>: Marca mudança. </text:p>
        </text:list-item>
        <text:list-item>
          <text:p text:style-name="P17"><text:span text:style-name="Source_20_Text">detect_duplicates(new_hashes)</text:span>: Chama detecção de duplicatas. </text:p>
        </text:list-item>
        <text:list-item>
          <text:p text:style-name="P17"><text:span text:style-name="Source_20_Text">if changes_detected:</text:span>: Se houve mudanças. </text:p>
        </text:list-item>
        <text:list-item>
          <text:p text:style-name="P17"><text:span text:style-name="Source_20_Text">with open('hashes.json', 'w') as json_file:</text:span>: Atualiza o baseline. </text:p>
        </text:list-item>
        <text:list-item>
          <text:p text:style-name="P17"><text:soft-page-break/><text:span text:style-name="Source_20_Text">json.dump(new_hashes, json_file, indent=4)</text:span>: Salva novos hashes. </text:p>
        </text:list-item>
        <text:list-item>
          <text:p text:style-name="P17"><text:span text:style-name="Source_20_Text">create_backup('hashes.json')</text:span>: Cria backup. </text:p>
        </text:list-item>
        <text:list-item>
          <text:p text:style-name="P17"><text:span text:style-name="Source_20_Text">print("Mudanças detectadas. Baseline atualizado e backup criado. Verifique o arquivo logs_monitor.log.")</text:span>: Imprime confirmação. </text:p>
        </text:list-item>
        <text:list-item>
          <text:p text:style-name="P17"><text:span text:style-name="Source_20_Text">else:</text:span>: Se não houve mudanças. </text:p>
        </text:list-item>
        <text:list-item>
          <text:p text:style-name="P16"><text:span text:style-name="Source_20_Text">print("Nenhuma mudança detectada.")</text:span>: Imprime mensagem. </text:p>
        </text:list-item>
      </text:list>
      <text:h text:style-name="Heading_20_3" text:outline-level="3"><text:span text:style-name="Strong_20_Emphasis">Bloco Principal </text:span><text:span text:style-name="Strong_20_Emphasis"><text:span text:style-name="Source_20_Text">if __name__ == "__main__"</text:span></text:span></text:h>
      <text:p text:style-name="Text_20_body">Executa o script quando rodado diretamente.</text:p>
      <text:list text:style-name="L9">
        <text:list-item>
          <text:p text:style-name="P19"><text:span text:style-name="Source_20_Text">if __name__ == "__main__":</text:span>: Verifica se o script é executado como programa principal. </text:p>
        </text:list-item>
        <text:list-item>
          <text:p text:style-name="P19"><text:span text:style-name="Source_20_Text">directory = '/home/rayblade/Documentos/Seguranca/'</text:span>: Define o diretório hardcoded. </text:p>
        </text:list-item>
        <text:list-item>
          <text:p text:style-name="P19"><text:span text:style-name="Source_20_Text">baseline_file = 'hashes.json'</text:span>: Define nome do baseline. </text:p>
        </text:list-item>
        <text:list-item>
          <text:p text:style-name="P19"><text:span text:style-name="Source_20_Text">log_file = 'logs_monitor.log'</text:span>: Define nome do log. </text:p>
        </text:list-item>
        <text:list-item>
          <text:p text:style-name="P19"><text:span text:style-name="Source_20_Text">report_file = 'relatorio.md'</text:span>: Define nome do relatório. </text:p>
        </text:list-item>
        <text:list-item>
          <text:p text:style-name="P19"><text:span text:style-name="Source_20_Text">if not os.path.isdir(directory):</text:span>: Verifica se o diretório existe. </text:p>
        </text:list-item>
        <text:list-item>
          <text:p text:style-name="P19"><text:span text:style-name="Source_20_Text">print(f"Erro: O diretório '{directory}' não existe.")</text:span>: Imprime erro. </text:p>
        </text:list-item>
        <text:list-item>
          <text:p text:style-name="P19"><text:span text:style-name="Source_20_Text">exit(1)</text:span>: Sai com código de erro. </text:p>
        </text:list-item>
        <text:list-item>
          <text:p text:style-name="P19"><text:span text:style-name="Source_20_Text">if not os.path.exists(baseline_file):</text:span>: Se baseline não existe. </text:p>
        </text:list-item>
        <text:list-item>
          <text:p text:style-name="P19"><text:span text:style-name="Source_20_Text">print("Gerando baseline inicial...")</text:span>: Imprime mensagem. </text:p>
        </text:list-item>
        <text:list-item>
          <text:p text:style-name="P19"><text:span text:style-name="Source_20_Text">generate_baseline(directory)</text:span>: Gera baseline. </text:p>
        </text:list-item>
        <text:list-item>
          <text:p text:style-name="P19"><text:span text:style-name="Source_20_Text">detect_changes(directory, baseline_file)</text:span>: Detecta mudanças. </text:p>
        </text:list-item>
        <text:list-item>
          <text:p text:style-name="P18"><text:span text:style-name="Source_20_Text">generate_report(log_file, report_file)</text:span>: Gera relatório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ntarell Extra Bold" officeooo:rsid="00160db3" officeooo:paragraph-rsid="00160d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xplicação do script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20:57:30.534945870</meta:creation-date>
    <dc:date>2025-10-17T20:59:33.630938444</dc:date>
    <meta:editing-duration>PT2M4S</meta:editing-duration>
    <meta:editing-cycles>1</meta:editing-cycles>
    <meta:document-statistic meta:table-count="0" meta:image-count="0" meta:object-count="0" meta:page-count="6" meta:paragraph-count="156" meta:word-count="1561" meta:character-count="11527" meta:non-whitespace-character-count="10121"/>
    <meta:generator>LibreOffice/7.4.7.2$Linux_X86_64 LibreOffice_project/40$Build-2</meta:generator>
  </office:meta>
</office:document-meta>
</file>